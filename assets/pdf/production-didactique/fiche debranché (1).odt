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0F0000000FA0762865A4F89A9D.gif" manifest:media-type="image/gif"/>
  <manifest:file-entry manifest:full-path="Pictures/100000000000055C00000640F064E3815018028B.jpg" manifest:media-type="image/jpeg"/>
  <manifest:file-entry manifest:full-path="Pictures/100000000000039A000002062F2D47ACA81394B8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OpenSymbol" svg:font-family="OpenSymbol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  <style:font-face style:name="Segoe UI Emoji1" svg:font-family="'Segoe UI Emoj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304cm" fo:margin-left="-0.164cm" fo:margin-top="0cm" fo:margin-bottom="0cm" table:align="left" style:writing-mode="lr-tb"/>
    </style:style>
    <style:style style:name="Table1.A" style:family="table-column">
      <style:table-column-properties style:column-width="4.041cm"/>
    </style:style>
    <style:style style:name="Table1.B" style:family="table-column">
      <style:table-column-properties style:column-width="8.89cm"/>
    </style:style>
    <style:style style:name="Table1.C" style:family="table-column">
      <style:table-column-properties style:column-width="2.115cm"/>
    </style:style>
    <style:style style:name="Table1.D" style:family="table-column">
      <style:table-column-properties style:column-width="2.256cm"/>
    </style:style>
    <style:style style:name="Table1.1" style:family="table-row">
      <style:table-row-properties style:min-row-height="0.39cm" fo:keep-together="auto"/>
    </style:style>
    <style:style style:name="Table1.A1" style:family="table-cell">
      <style:table-cell-properties fo:background-color="#deeaf1" fo:padding-left="0.265cm" fo:padding-right="0.265cm" fo:padding-top="0.141cm" fo:padding-bottom="0.141cm" fo:border="0.25pt solid #bdd7ee">
        <style:background-image/>
      </style:table-cell-properties>
    </style:style>
    <style:style style:name="Table1.B1" style:family="table-cell">
      <style:table-cell-properties fo:background-color="#ffffff" fo:padding-left="0.265cm" fo:padding-right="0.265cm" fo:padding-top="0.141cm" fo:padding-bottom="0.141cm" fo:border="0.25pt solid #bdd7ee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2" style:family="table">
      <style:table-properties style:width="18.415cm" fo:margin-left="-0.64cm" fo:margin-top="0cm" fo:margin-bottom="0cm" table:align="left" style:writing-mode="lr-tb"/>
    </style:style>
    <style:style style:name="Table2.A" style:family="table-column">
      <style:table-column-properties style:column-width="2.223cm"/>
    </style:style>
    <style:style style:name="Table2.B" style:family="table-column">
      <style:table-column-properties style:column-width="4.604cm"/>
    </style:style>
    <style:style style:name="Table2.C" style:family="table-column">
      <style:table-column-properties style:column-width="4.284cm"/>
    </style:style>
    <style:style style:name="Table2.D" style:family="table-column">
      <style:table-column-properties style:column-width="2.397cm"/>
    </style:style>
    <style:style style:name="Table2.E" style:family="table-column">
      <style:table-column-properties style:column-width="4.90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bdd7ee" fo:padding-left="0.265cm" fo:padding-right="0.265cm" fo:padding-top="0.176cm" fo:padding-bottom="0.176cm" fo:border="0.25pt solid #bdd7ee">
        <style:background-image/>
      </style:table-cell-properties>
    </style:style>
    <style:style style:name="Table2.A2" style:family="table-cell">
      <style:table-cell-properties style:vertical-align="middle" fo:background-color="#deeaf1" fo:padding-left="0.265cm" fo:padding-right="0.265cm" fo:padding-top="0.176cm" fo:padding-bottom="0.176cm" fo:border="0.25pt solid #bdd7ee">
        <style:background-image/>
      </style:table-cell-properties>
    </style:style>
    <style:style style:name="Table2.B2" style:family="table-cell">
      <style:table-cell-properties fo:background-color="#ffffff" fo:padding-left="0.265cm" fo:padding-right="0.265cm" fo:padding-top="0.176cm" fo:padding-bottom="0.176cm" fo:border="0.25pt solid #bdd7ee">
        <style:background-image/>
      </style:table-cell-properties>
    </style:style>
    <style:style style:name="Table2.C2" style:family="table-cell">
      <style:table-cell-properties fo:background-color="#ffffff" fo:padding-left="0.265cm" fo:padding-right="0.265cm" fo:padding-top="0.176cm" fo:padding-bottom="0.176cm" fo:border="0.25pt solid #bdd7ee">
        <style:background-image/>
      </style:table-cell-properties>
    </style:style>
    <style:style style:name="Table2.D2" style:family="table-cell">
      <style:table-cell-properties fo:background-color="#ffffff" fo:padding-left="0.265cm" fo:padding-right="0.265cm" fo:padding-top="0.176cm" fo:padding-bottom="0.176cm" fo:border="0.25pt solid #bdd7ee">
        <style:background-image/>
      </style:table-cell-properties>
    </style:style>
    <style:style style:name="Table2.E2" style:family="table-cell">
      <style:table-cell-properties fo:background-color="#ffffff" fo:padding-left="0.265cm" fo:padding-right="0.265cm" fo:padding-top="0.176cm" fo:padding-bottom="0.176cm" fo:border="0.25pt solid #bdd7ee">
        <style:background-image/>
      </style:table-cell-properties>
    </style:style>
    <style:style style:name="Table2.B3" style:family="table-cell">
      <style:table-cell-properties fo:background-color="#f2f2f2" fo:padding-left="0.265cm" fo:padding-right="0.265cm" fo:padding-top="0.176cm" fo:padding-bottom="0.176cm" fo:border="0.25pt solid #bdd7ee">
        <style:background-image/>
      </style:table-cell-properties>
    </style:style>
    <style:style style:name="Table2.C3" style:family="table-cell">
      <style:table-cell-properties fo:background-color="#f2f2f2" fo:padding-left="0.265cm" fo:padding-right="0.265cm" fo:padding-top="0.176cm" fo:padding-bottom="0.176cm" fo:border="0.25pt solid #bdd7ee">
        <style:background-image/>
      </style:table-cell-properties>
    </style:style>
    <style:style style:name="Table2.D3" style:family="table-cell">
      <style:table-cell-properties fo:background-color="#f2f2f2" fo:padding-left="0.265cm" fo:padding-right="0.265cm" fo:padding-top="0.176cm" fo:padding-bottom="0.176cm" fo:border="0.25pt solid #bdd7ee">
        <style:background-image/>
      </style:table-cell-properties>
    </style:style>
    <style:style style:name="Table2.E3" style:family="table-cell">
      <style:table-cell-properties fo:background-color="#f2f2f2" fo:padding-left="0.265cm" fo:padding-right="0.265cm" fo:padding-top="0.176cm" fo:padding-bottom="0.176cm" fo:border="0.25pt solid #bdd7ee">
        <style:background-image/>
      </style:table-cell-properties>
    </style:style>
    <style:style style:name="Table2.B4" style:family="table-cell">
      <style:table-cell-properties fo:background-color="#ffffff" fo:padding-left="0.265cm" fo:padding-right="0.265cm" fo:padding-top="0.176cm" fo:padding-bottom="0.176cm" fo:border="0.25pt solid #bdd7ee">
        <style:background-image/>
      </style:table-cell-properties>
    </style:style>
    <style:style style:name="Table2.C4" style:family="table-cell">
      <style:table-cell-properties fo:background-color="#ffffff" fo:padding-left="0.265cm" fo:padding-right="0.265cm" fo:padding-top="0.176cm" fo:padding-bottom="0.176cm" fo:border="0.25pt solid #bdd7ee">
        <style:background-image/>
      </style:table-cell-properties>
    </style:style>
    <style:style style:name="Table2.D4" style:family="table-cell">
      <style:table-cell-properties fo:background-color="#ffffff" fo:padding-left="0.265cm" fo:padding-right="0.265cm" fo:padding-top="0.176cm" fo:padding-bottom="0.176cm" fo:border="0.25pt solid #bdd7ee">
        <style:background-image/>
      </style:table-cell-properties>
    </style:style>
    <style:style style:name="Table2.E4" style:family="table-cell">
      <style:table-cell-properties fo:background-color="#ffffff" fo:padding-left="0.265cm" fo:padding-right="0.265cm" fo:padding-top="0.176cm" fo:padding-bottom="0.176cm" fo:border="0.25pt solid #bdd7ee">
        <style:background-image/>
      </style:table-cell-properties>
    </style:style>
    <style:style style:name="P1" style:family="paragraph" style:parent-style-name="Standard">
      <style:text-properties fo:color="#000000" fo:font-weight="bold" style:font-weight-asian="bold" style:font-weight-complex="bold"/>
    </style:style>
    <style:style style:name="P2" style:family="paragraph" style:parent-style-name="Standard">
      <style:text-properties fo:color="#ee0000"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WWNum1">
      <style:paragraph-properties fo:margin-top="0.071cm" fo:margin-bottom="0.071cm" loext:contextual-spacing="false"/>
    </style:style>
    <style:style style:name="P5" style:family="paragraph" style:parent-style-name="Standard">
      <style:paragraph-properties fo:margin-top="0cm" fo:margin-bottom="0.282cm" loext:contextual-spacing="true" fo:line-height="115%" fo:hyphenation-ladder-count="no-limit" style:vertical-align="auto"/>
      <style:text-properties fo:color="#000000" fo:hyphenate="true" fo:hyphenation-remain-char-count="2" fo:hyphenation-push-char-count="2"/>
    </style:style>
    <style:style style:name="P6" style:family="paragraph" style:parent-style-name="Standard">
      <style:paragraph-properties fo:margin-top="0cm" fo:margin-bottom="0.282cm" loext:contextual-spacing="true" fo:line-height="115%" fo:hyphenation-ladder-count="no-limit" style:vertical-align="auto"/>
      <style:text-properties fo:hyphenate="true" fo:hyphenation-remain-char-count="2" fo:hyphenation-push-char-count="2"/>
    </style:style>
    <style:style style:name="P7" style:family="paragraph" style:parent-style-name="Standard">
      <style:paragraph-properties fo:margin-left="0.231cm" fo:margin-right="0cm" fo:text-indent="0cm" style:auto-text-indent="false"/>
    </style:style>
    <style:style style:name="P8" style:family="paragraph" style:parent-style-name="Standard">
      <style:paragraph-properties fo:margin-top="0cm" fo:margin-bottom="0.282cm" loext:contextual-spacing="false" fo:line-height="115%"/>
    </style:style>
    <style:style style:name="P9" style:family="paragraph" style:parent-style-name="Standard">
      <style:paragraph-properties fo:margin-top="0cm" fo:margin-bottom="0.282cm" loext:contextual-spacing="false" fo:line-height="115%" fo:text-align="center" style:justify-single-word="false"/>
    </style:style>
    <style:style style:name="P10" style:family="paragraph" style:parent-style-name="Standard">
      <style:paragraph-properties fo:margin-left="0.635cm" fo:margin-right="0cm" fo:margin-top="0cm" fo:margin-bottom="0.282cm" loext:contextual-spacing="true" fo:line-height="115%" fo:text-align="center" style:justify-single-word="false" fo:hyphenation-ladder-count="no-limit" fo:text-indent="0cm" style:auto-text-indent="false" style:vertical-align="auto"/>
      <style:text-properties fo:hyphenate="true" fo:hyphenation-remain-char-count="2" fo:hyphenation-push-char-count="2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List_20_Paragraph" style:list-style-name="WWNum1"/>
    <style:style style:name="P13" style:family="paragraph" style:parent-style-name="List_20_Paragraph">
      <style:text-properties fo:color="#000000"/>
    </style:style>
    <style:style style:name="P14" style:family="paragraph" style:parent-style-name="List_20_Paragraph" style:list-style-name="WWNum1">
      <style:paragraph-properties fo:margin-top="0.071cm" fo:margin-bottom="0.071cm" loext:contextual-spacing="false"/>
    </style:style>
    <style:style style:name="P15" style:family="paragraph" style:parent-style-name="List_20_Paragraph" style:list-style-name="WWNum5">
      <style:paragraph-properties fo:margin-top="0cm" fo:margin-bottom="0.282cm" loext:contextual-spacing="true" fo:line-height="115%" fo:hyphenation-ladder-count="no-limit" style:vertical-align="auto"/>
      <style:text-properties fo:hyphenate="true" fo:hyphenation-remain-char-count="2" fo:hyphenation-push-char-count="2"/>
    </style:style>
    <style:style style:name="P16" style:family="paragraph" style:parent-style-name="List_20_Paragraph" style:list-style-name="WWNum10">
      <style:paragraph-properties fo:margin-top="0cm" fo:margin-bottom="0.282cm" loext:contextual-spacing="true" fo:line-height="115%" fo:hyphenation-ladder-count="no-limit" style:vertical-align="auto"/>
      <style:text-properties fo:hyphenate="true" fo:hyphenation-remain-char-count="2" fo:hyphenation-push-char-count="2"/>
    </style:style>
    <style:style style:name="P17" style:family="paragraph" style:parent-style-name="List_20_Paragraph" style:list-style-name="WWNum8">
      <style:paragraph-properties fo:margin-top="0cm" fo:margin-bottom="0.282cm" loext:contextual-spacing="true" fo:line-height="115%" fo:hyphenation-ladder-count="no-limit" style:vertical-align="auto"/>
      <style:text-properties fo:hyphenate="true" fo:hyphenation-remain-char-count="2" fo:hyphenation-push-char-count="2"/>
    </style:style>
    <style:style style:name="P18" style:family="paragraph" style:parent-style-name="List_20_Paragraph">
      <style:paragraph-properties fo:margin-left="1.27cm" fo:margin-right="0cm" fo:margin-top="0cm" fo:margin-bottom="0.282cm" loext:contextual-spacing="true" fo:line-height="115%" fo:hyphenation-ladder-count="no-limit" fo:text-indent="0cm" style:auto-text-indent="false" style:vertical-align="auto"/>
      <style:text-properties fo:color="#000000" fo:hyphenate="true" fo:hyphenation-remain-char-count="2" fo:hyphenation-push-char-count="2"/>
    </style:style>
    <style:style style:name="P19" style:family="paragraph" style:parent-style-name="List_20_Paragraph">
      <style:paragraph-properties fo:margin-top="0cm" fo:margin-bottom="0.282cm" loext:contextual-spacing="false" fo:line-height="115%"/>
      <style:text-properties fo:color="#000000"/>
    </style:style>
    <style:style style:name="P20" style:family="paragraph" style:parent-style-name="List_20_Paragraph">
      <style:paragraph-properties fo:margin-top="0cm" fo:margin-bottom="0.282cm" loext:contextual-spacing="false" fo:line-height="115%"/>
    </style:style>
    <style:style style:name="P21" style:family="paragraph" style:parent-style-name="List_20_Paragraph">
      <style:paragraph-properties fo:margin-left="0.866cm" fo:margin-right="0cm" fo:margin-top="0cm" fo:margin-bottom="0.282cm" loext:contextual-spacing="true" fo:line-height="115%" fo:hyphenation-ladder-count="no-limit" fo:text-indent="0cm" style:auto-text-indent="false" style:vertical-align="auto"/>
      <style:text-properties fo:hyphenate="true" fo:hyphenation-remain-char-count="2" fo:hyphenation-push-char-count="2"/>
    </style:style>
    <style:style style:name="P22" style:family="paragraph" style:parent-style-name="List_20_Paragraph" style:list-style-name="WWNum6">
      <style:paragraph-properties fo:margin-left="0.866cm" fo:margin-right="0cm" fo:margin-top="0cm" fo:margin-bottom="0.282cm" loext:contextual-spacing="true" fo:line-height="115%" fo:hyphenation-ladder-count="no-limit" fo:text-indent="-0.635cm" style:auto-text-indent="false" style:vertical-align="auto"/>
      <style:text-properties fo:hyphenate="true" fo:hyphenation-remain-char-count="2" fo:hyphenation-push-char-count="2"/>
    </style:style>
    <style:style style:name="P23" style:family="paragraph" style:parent-style-name="List_20_Paragraph" style:list-style-name="WWNum16">
      <style:paragraph-properties fo:margin-left="0.866cm" fo:margin-right="0cm" fo:margin-top="0cm" fo:margin-bottom="0.353cm" loext:contextual-spacing="true" fo:line-height="115%" fo:hyphenation-ladder-count="no-limit" fo:text-indent="-0.635cm" style:auto-text-indent="false" style:vertical-align="auto"/>
      <style:text-properties fo:hyphenate="true" fo:hyphenation-remain-char-count="2" fo:hyphenation-push-char-count="2"/>
    </style:style>
    <style:style style:name="P24" style:family="paragraph" style:parent-style-name="List_20_Paragraph" style:list-style-name="WWNum16">
      <style:paragraph-properties fo:margin-left="0.834cm" fo:margin-right="0cm" fo:margin-top="0cm" fo:margin-bottom="0.353cm" loext:contextual-spacing="true" fo:line-height="115%" fo:hyphenation-ladder-count="no-limit" fo:text-indent="-0.635cm" style:auto-text-indent="false" style:vertical-align="auto"/>
      <style:text-properties fo:hyphenate="true" fo:hyphenation-remain-char-count="2" fo:hyphenation-push-char-count="2"/>
    </style:style>
    <style:style style:name="P25" style:family="paragraph" style:parent-style-name="List_20_Paragraph" style:list-style-name="WWNum10">
      <style:paragraph-properties fo:margin-left="0.834cm" fo:margin-right="0cm" fo:margin-top="0cm" fo:margin-bottom="0.282cm" loext:contextual-spacing="true" fo:line-height="115%" fo:hyphenation-ladder-count="no-limit" fo:text-indent="-0.635cm" style:auto-text-indent="false" style:vertical-align="auto"/>
      <style:text-properties fo:hyphenate="true" fo:hyphenation-remain-char-count="2" fo:hyphenation-push-char-count="2"/>
    </style:style>
    <style:style style:name="P26" style:family="paragraph" style:parent-style-name="List_20_Paragraph">
      <style:paragraph-properties fo:margin-left="0.84cm" fo:margin-right="0cm" fo:margin-top="0cm" fo:margin-bottom="0.282cm" loext:contextual-spacing="true" fo:line-height="115%" fo:hyphenation-ladder-count="no-limit" fo:text-indent="0cm" style:auto-text-indent="false" style:vertical-align="auto"/>
      <style:text-properties fo:color="#000000" fo:hyphenate="true" fo:hyphenation-remain-char-count="2" fo:hyphenation-push-char-count="2"/>
    </style:style>
    <style:style style:name="P27" style:family="paragraph" style:parent-style-name="List_20_Paragraph" style:list-style-name="WWNum7">
      <style:paragraph-properties fo:margin-left="0.84cm" fo:margin-right="0cm" fo:margin-top="0cm" fo:margin-bottom="0.282cm" loext:contextual-spacing="true" fo:line-height="115%" fo:hyphenation-ladder-count="no-limit" fo:text-indent="-0.476cm" style:auto-text-indent="false" style:vertical-align="auto"/>
      <style:text-properties fo:hyphenate="true" fo:hyphenation-remain-char-count="2" fo:hyphenation-push-char-count="2"/>
    </style:style>
    <style:style style:name="P28" style:family="paragraph" style:parent-style-name="List_20_Paragraph" style:list-style-name="WWNum8">
      <style:paragraph-properties fo:margin-left="0.522cm" fo:margin-right="0cm" fo:margin-top="0cm" fo:margin-bottom="0.282cm" loext:contextual-spacing="true" fo:line-height="115%" fo:hyphenation-ladder-count="no-limit" fo:text-indent="-0.476cm" style:auto-text-indent="false" style:vertical-align="auto"/>
      <style:text-properties fo:hyphenate="true" fo:hyphenation-remain-char-count="2" fo:hyphenation-push-char-count="2"/>
    </style:style>
    <style:style style:name="P29" style:family="paragraph" style:parent-style-name="List_20_Paragraph" style:list-style-name="WWNum9">
      <style:paragraph-properties fo:margin-left="0.363cm" fo:margin-right="0cm" fo:margin-top="0cm" fo:margin-bottom="0.282cm" loext:contextual-spacing="true" fo:line-height="115%" fo:hyphenation-ladder-count="no-limit" fo:text-indent="-0.363cm" style:auto-text-indent="false" style:vertical-align="auto"/>
      <style:text-properties fo:hyphenate="true" fo:hyphenation-remain-char-count="2" fo:hyphenation-push-char-count="2"/>
    </style:style>
    <style:style style:name="P30" style:family="paragraph" style:parent-style-name="List_20_Paragraph">
      <style:paragraph-properties fo:margin-left="1.349cm" fo:margin-right="0cm" fo:margin-top="0cm" fo:margin-bottom="0.282cm" loext:contextual-spacing="true" fo:line-height="115%" fo:hyphenation-ladder-count="no-limit" fo:text-indent="0cm" style:auto-text-indent="false" style:vertical-align="auto"/>
      <style:text-properties fo:color="#000000" fo:hyphenate="true" fo:hyphenation-remain-char-count="2" fo:hyphenation-push-char-count="2"/>
    </style:style>
    <style:style style:name="P31" style:family="paragraph" style:parent-style-name="List_20_Paragraph">
      <style:paragraph-properties fo:margin-left="1.349cm" fo:margin-right="0cm" fo:margin-top="0cm" fo:margin-bottom="0.282cm" loext:contextual-spacing="true" fo:line-height="115%" fo:hyphenation-ladder-count="no-limit" fo:text-indent="0cm" style:auto-text-indent="false" style:vertical-align="auto"/>
      <style:text-properties fo:hyphenate="true" fo:hyphenation-remain-char-count="2" fo:hyphenation-push-char-count="2"/>
    </style:style>
    <style:style style:name="P32" style:family="paragraph" style:parent-style-name="List_20_Paragraph" style:list-style-name="WWNum11">
      <style:paragraph-properties fo:margin-left="0.993cm" fo:margin-right="0cm" fo:margin-top="0cm" fo:margin-bottom="0.282cm" loext:contextual-spacing="true" fo:line-height="115%" fo:hyphenation-ladder-count="no-limit" fo:text-indent="-0.794cm" style:auto-text-indent="false" style:vertical-align="auto"/>
      <style:text-properties fo:hyphenate="true" fo:hyphenation-remain-char-count="2" fo:hyphenation-push-char-count="2"/>
    </style:style>
    <style:style style:name="P33" style:family="paragraph" style:parent-style-name="List_20_Paragraph" style:list-style-name="WWNum17">
      <style:paragraph-properties fo:margin-left="1.087cm" fo:margin-right="0cm" fo:margin-top="0cm" fo:margin-bottom="0.282cm" loext:contextual-spacing="true" fo:line-height="115%" fo:hyphenation-ladder-count="no-limit" fo:text-indent="-0.635cm" style:auto-text-indent="false" style:vertical-align="auto"/>
      <style:text-properties fo:hyphenate="true" fo:hyphenation-remain-char-count="2" fo:hyphenation-push-char-count="2"/>
    </style:style>
    <style:style style:name="P34" style:family="paragraph" style:parent-style-name="List_20_Paragraph" style:list-style-name="WWNum17">
      <style:paragraph-properties fo:margin-left="1.469cm" fo:margin-right="0cm" fo:margin-top="0cm" fo:margin-bottom="0.282cm" loext:contextual-spacing="true" fo:line-height="115%" fo:hyphenation-ladder-count="no-limit" fo:text-indent="-0.635cm" style:auto-text-indent="false" style:vertical-align="auto"/>
      <style:text-properties fo:hyphenate="true" fo:hyphenation-remain-char-count="2" fo:hyphenation-push-char-count="2"/>
    </style:style>
    <style:style style:name="P35" style:family="paragraph" style:parent-style-name="List_20_Paragraph" style:list-style-name="WWNum17">
      <style:paragraph-properties fo:margin-left="1.628cm" fo:margin-right="0cm" fo:margin-top="0cm" fo:margin-bottom="0.282cm" loext:contextual-spacing="true" fo:line-height="115%" fo:hyphenation-ladder-count="no-limit" fo:text-indent="-0.794cm" style:auto-text-indent="false" style:vertical-align="auto"/>
      <style:text-properties fo:hyphenate="true" fo:hyphenation-remain-char-count="2" fo:hyphenation-push-char-count="2"/>
    </style:style>
    <style:style style:name="P36" style:family="paragraph" style:parent-style-name="List_20_Paragraph">
      <style:paragraph-properties fo:margin-left="1.628cm" fo:margin-right="0cm" fo:margin-top="0cm" fo:margin-bottom="0.282cm" loext:contextual-spacing="true" fo:line-height="115%" fo:hyphenation-ladder-count="no-limit" fo:text-indent="0cm" style:auto-text-indent="false" style:vertical-align="auto"/>
      <style:text-properties fo:hyphenate="true" fo:hyphenation-remain-char-count="2" fo:hyphenation-push-char-count="2"/>
    </style:style>
    <style:style style:name="P37" style:family="paragraph" style:parent-style-name="List_20_Paragraph">
      <style:paragraph-properties fo:margin-left="-0.078cm" fo:margin-right="0cm" fo:text-indent="0.318cm" style:auto-text-indent="false"/>
      <style:text-properties fo:font-weight="bold" style:font-weight-asian="bold" style:font-weight-complex="bold"/>
    </style:style>
    <style:style style:name="P38" style:family="paragraph" style:parent-style-name="List_20_Paragraph" style:list-style-name="WWNum12">
      <style:paragraph-properties fo:margin-left="0.669cm" fo:margin-right="0cm" fo:text-indent="-0.635cm" style:auto-text-indent="false"/>
    </style:style>
    <style:style style:name="P39" style:family="paragraph" style:parent-style-name="Standard_20__28_user_29_">
      <style:paragraph-properties fo:text-align="center" style:justify-single-word="false"/>
    </style:style>
    <style:style style:name="P40" style:family="paragraph" style:parent-style-name="Standard_20__28_user_29_">
      <style:paragraph-properties fo:line-height="115%" fo:text-align="justify" style:justify-single-word="false"/>
    </style:style>
    <style:style style:name="P41" style:family="paragraph" style:parent-style-name="Standard_20__28_user_29_" style:master-page-name="Standard">
      <loext:graphic-properties draw:fill="solid" draw:fill-color="#1f4e79"/>
      <style:paragraph-properties fo:margin-top="0cm" fo:margin-bottom="0.353cm" loext:contextual-spacing="false" fo:text-align="center" style:justify-single-word="false" style:page-number="auto" fo:background-color="#1f4e79"/>
    </style:style>
    <style:style style:name="P42" style:family="paragraph" style:parent-style-name="Standard_20__28_user_29_">
      <style:paragraph-properties fo:margin-top="0.141cm" fo:margin-bottom="0.353cm" loext:contextual-spacing="false" fo:text-align="center" style:justify-single-word="false"/>
    </style:style>
    <style:style style:name="P43" style:family="paragraph" style:parent-style-name="Standard_20__28_user_29_">
      <style:paragraph-properties fo:margin-top="0.247cm" fo:margin-bottom="0cm" loext:contextual-spacing="false"/>
    </style:style>
    <style:style style:name="P44" style:family="paragraph" style:parent-style-name="Standard_20__28_user_29_">
      <style:paragraph-properties fo:margin-top="0.353cm" fo:margin-bottom="0.106cm" loext:contextual-spacing="false"/>
    </style:style>
    <style:style style:name="P45" style:family="paragraph" style:parent-style-name="Standard_20__28_user_29_">
      <loext:graphic-properties draw:fill="solid" draw:fill-color="#2e75b6"/>
      <style:paragraph-properties fo:margin-top="0.353cm" fo:margin-bottom="0.106cm" loext:contextual-spacing="false" fo:background-color="#2e75b6"/>
    </style:style>
    <style:style style:name="P46" style:family="paragraph" style:parent-style-name="Standard_20__28_user_29_">
      <style:paragraph-properties fo:margin-top="0.353cm" fo:margin-bottom="0.106cm" loext:contextual-spacing="false"/>
      <style:text-properties style:font-name="Segoe UI Emoji" style:font-name-complex="Segoe UI Emoji1"/>
    </style:style>
    <style:style style:name="P47" style:family="paragraph" style:parent-style-name="Standard_20__28_user_29_">
      <loext:graphic-properties draw:fill="solid" draw:fill-color="#2e75b6"/>
      <style:paragraph-properties fo:margin-top="0.353cm" fo:margin-bottom="0.106cm" loext:contextual-spacing="false" fo:line-height="115%" fo:background-color="#2e75b6"/>
    </style:style>
    <style:style style:name="P48" style:family="paragraph" style:parent-style-name="Standard_20__28_user_29_">
      <style:paragraph-properties fo:margin-top="0.353cm" fo:margin-bottom="0.176cm" loext:contextual-spacing="false"/>
    </style:style>
    <style:style style:name="P49" style:family="paragraph" style:parent-style-name="Standard_20__28_user_29_" style:list-style-name="WWNum4">
      <style:paragraph-properties fo:margin-top="0.353cm" fo:margin-bottom="0.176cm" loext:contextual-spacing="false"/>
    </style:style>
    <style:style style:name="P50" style:family="paragraph" style:parent-style-name="Standard_20__28_user_29_" style:list-style-name="WWNum1">
      <style:paragraph-properties fo:margin-top="0.353cm" fo:margin-bottom="0.176cm" loext:contextual-spacing="false"/>
    </style:style>
    <style:style style:name="P51" style:family="paragraph" style:parent-style-name="Standard_20__28_user_29_" style:list-style-name="WWNum14">
      <style:paragraph-properties fo:margin-top="0.353cm" fo:margin-bottom="0.176cm" loext:contextual-spacing="false"/>
    </style:style>
    <style:style style:name="P52" style:family="paragraph" style:parent-style-name="Standard_20__28_user_29_">
      <style:paragraph-properties fo:margin-top="0.353cm" fo:margin-bottom="0.176cm" loext:contextual-spacing="false"/>
      <style:text-properties fo:font-weight="bold" style:font-weight-asian="bold" style:font-weight-complex="bold"/>
    </style:style>
    <style:style style:name="P53" style:family="paragraph" style:parent-style-name="Standard_20__28_user_29_" style:list-style-name="WWNum13">
      <style:paragraph-properties fo:margin-top="0.353cm" fo:margin-bottom="0.176cm" loext:contextual-spacing="false"/>
    </style:style>
    <style:style style:name="P54" style:family="paragraph" style:parent-style-name="Standard_20__28_user_29_">
      <style:paragraph-properties fo:margin-top="0.353cm" fo:margin-bottom="0.176cm" loext:contextual-spacing="false" fo:line-height="115%"/>
    </style:style>
    <style:style style:name="P55" style:family="paragraph" style:parent-style-name="Standard_20__28_user_29_">
      <style:paragraph-properties fo:margin-top="0.353cm" fo:margin-bottom="0.176cm" loext:contextual-spacing="false" fo:line-height="115%" fo:text-align="justify" style:justify-single-word="false"/>
    </style:style>
    <style:style style:name="P56" style:family="paragraph" style:parent-style-name="Standard_20__28_user_29_" style:list-style-name="WWNum1">
      <style:paragraph-properties fo:margin-top="0.353cm" fo:margin-bottom="0.176cm" loext:contextual-spacing="false" fo:line-height="115%" fo:text-align="justify" style:justify-single-word="false"/>
    </style:style>
    <style:style style:name="P57" style:family="paragraph" style:parent-style-name="Standard_20__28_user_29_" style:list-style-name="WWNum22">
      <style:paragraph-properties fo:margin-top="0.353cm" fo:margin-bottom="0.176cm" loext:contextual-spacing="false" fo:line-height="115%"/>
    </style:style>
    <style:style style:name="P58" style:family="paragraph" style:parent-style-name="Standard_20__28_user_29_" style:list-style-name="WWNum23">
      <style:paragraph-properties fo:margin-top="0.353cm" fo:margin-bottom="0.176cm" loext:contextual-spacing="false" fo:line-height="115%"/>
    </style:style>
    <style:style style:name="P59" style:family="paragraph" style:parent-style-name="Standard_20__28_user_29_">
      <style:paragraph-properties fo:margin-top="0.353cm" fo:margin-bottom="0.176cm" loext:contextual-spacing="false"/>
      <style:text-properties style:font-name="Arial" style:font-name-complex="Arial1"/>
    </style:style>
    <style:style style:name="P60" style:family="paragraph" style:parent-style-name="Standard_20__28_user_29_">
      <style:paragraph-properties fo:margin-top="0.141cm" fo:margin-bottom="0cm" loext:contextual-spacing="false"/>
    </style:style>
    <style:style style:name="P61" style:family="paragraph" style:parent-style-name="Standard_20__28_user_29_">
      <style:paragraph-properties fo:margin-top="0.106cm" fo:margin-bottom="0cm" loext:contextual-spacing="false"/>
    </style:style>
    <style:style style:name="P62" style:family="paragraph" style:parent-style-name="Standard_20__28_user_29_">
      <style:paragraph-properties fo:margin-top="0.106cm" fo:margin-bottom="0cm" loext:contextual-spacing="false" fo:text-align="center" style:justify-single-word="false"/>
    </style:style>
    <style:style style:name="P63" style:family="paragraph" style:parent-style-name="Standard_20__28_user_29_" style:list-style-name="WWNum1">
      <style:paragraph-properties fo:margin-top="0.106cm" fo:margin-bottom="0cm" loext:contextual-spacing="false"/>
    </style:style>
    <style:style style:name="P64" style:family="paragraph" style:parent-style-name="Standard_20__28_user_29_" style:list-style-name="WWNum21">
      <style:paragraph-properties fo:margin-left="0.358cm" fo:margin-right="0cm" fo:margin-top="0.106cm" fo:margin-bottom="0cm" loext:contextual-spacing="false" fo:text-indent="-0.318cm" style:auto-text-indent="false"/>
    </style:style>
    <style:style style:name="P65" style:family="paragraph" style:parent-style-name="Standard_20__28_user_29_" style:list-style-name="WWNum15">
      <style:paragraph-properties fo:margin-left="0.676cm" fo:margin-right="0cm" fo:margin-top="0.106cm" fo:margin-bottom="0cm" loext:contextual-spacing="false" fo:text-indent="-0.476cm" style:auto-text-indent="false"/>
    </style:style>
    <style:style style:name="P66" style:family="paragraph" style:parent-style-name="Standard_20__28_user_29_">
      <style:paragraph-properties fo:margin-left="0.676cm" fo:margin-right="0cm" fo:margin-top="0.106cm" fo:margin-bottom="0cm" loext:contextual-spacing="false" fo:text-indent="0cm" style:auto-text-indent="false"/>
    </style:style>
    <style:style style:name="P67" style:family="paragraph" style:parent-style-name="Standard_20__28_user_29_" style:list-style-name="WWNum20">
      <style:paragraph-properties fo:margin-left="0.669cm" fo:margin-right="0cm" fo:margin-top="0.106cm" fo:margin-bottom="0cm" loext:contextual-spacing="false" fo:text-indent="-0.669cm" style:auto-text-indent="false"/>
    </style:style>
    <style:style style:name="P68" style:family="paragraph" style:parent-style-name="Standard_20__28_user_29_">
      <style:paragraph-properties fo:margin-left="1.251cm" fo:margin-right="0cm" fo:margin-top="0.353cm" fo:margin-bottom="0.176cm" loext:contextual-spacing="false" fo:line-height="115%" fo:text-align="justify" style:justify-single-word="false" fo:text-indent="0cm" style:auto-text-indent="false"/>
    </style:style>
    <style:style style:name="P69" style:family="paragraph" style:parent-style-name="Standard_20__28_user_29_">
      <style:paragraph-properties fo:margin-left="1.251cm" fo:margin-right="0cm" fo:margin-top="0.353cm" fo:margin-bottom="0.176cm" loext:contextual-spacing="false" fo:line-height="115%" fo:text-align="justify" style:justify-single-word="false" fo:text-indent="0cm" style:auto-text-indent="false"/>
      <style:text-properties style:font-name="Segoe UI Emoji" style:font-name-complex="Segoe UI Emoji1"/>
    </style:style>
    <style:style style:name="P70" style:family="paragraph" style:parent-style-name="Standard_20__28_user_29_">
      <style:paragraph-properties fo:margin-left="1.27cm" fo:margin-right="0cm" fo:margin-top="0.353cm" fo:margin-bottom="0.176cm" loext:contextual-spacing="false" fo:line-height="115%" fo:text-align="justify" style:justify-single-word="false" fo:text-indent="0cm" style:auto-text-indent="false"/>
    </style:style>
    <style:style style:name="P7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2" style:family="text">
      <style:text-properties fo:color="#ffffff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3" style:family="text">
      <style:text-properties fo:color="#ffffff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4" style:family="text">
      <style:text-properties fo:color="#ffffff" style:font-name="Times New Roman" fo:font-size="14pt" fo:font-weight="bold" style:font-name-asian="Arial1" style:font-size-asian="14pt" style:font-weight-asian="bold" style:font-name-complex="Times New Roman2" style:font-size-complex="14pt" style:font-weight-complex="bold"/>
    </style:style>
    <style:style style:name="T5" style:family="text">
      <style:text-properties fo:color="#1f4e79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6" style:family="text">
      <style:text-properties fo:color="#1f4e79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7" style:family="text">
      <style:text-properties style:font-name="Arial" fo:font-size="10pt" style:font-name-asian="Arial1" style:font-size-asian="10pt" style:font-name-complex="Arial1" style:font-size-complex="10pt"/>
    </style:style>
    <style:style style:name="T8" style:family="text">
      <style:text-properties fo:color="#000000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style:font-name="Segoe UI Emoji" style:font-name-complex="Segoe UI Emoji1"/>
    </style:style>
    <style:style style:name="T12" style:family="text">
      <style:text-properties fo:color="#000000"/>
    </style:style>
    <style:style style:name="T13" style:family="text">
      <style:text-properties style:font-name-complex="Times New Roman2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ee0000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16" style:family="text">
      <style:text-properties fo:color="#ee0000" fo:font-weight="bold" style:font-weight-asian="bold" style:font-weight-complex="bold"/>
    </style:style>
    <style:style style:name="T17" style:family="text">
      <style:text-properties style:font-style-complex="italic" style:font-weight-complex="bold"/>
    </style:style>
    <style:style style:name="T18" style:family="text">
      <style:text-properties style:font-name="Segoe UI Emoji" style:font-name-complex="Segoe UI Emoji1"/>
    </style:style>
    <style:style style:name="T19" style:family="text">
      <style:text-properties fo:color="#c00000" fo:font-weight="bold" style:font-weight-asian="bold" style:font-weight-complex="bold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style:font-name="Times New Roman" style:font-name-complex="Times New Roman2"/>
    </style:style>
    <style:style style:name="T22" style:family="text">
      <style:text-properties style:font-name="Times New Roman" fo:font-weight="bold" style:font-weight-asian="bold" style:font-name-complex="Times New Roman2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635cm" fo:margin-right="0.646cm" fo:margin-top="0.318cm" fo:margin-bottom="0.298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T1">Fiche Pédagogique</text:span></text:p>
      <text:p text:style-name="P4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_20__28_user_29_"><text:span text:style-name="T5">Matière :</text:span></text:p>
          </table:table-cell>
          <table:table-cell table:style-name="Table1.B1" office:value-type="string">
            <text:p text:style-name="Standard_20__28_user_29_"><text:span text:style-name="T7">Informatique</text:span></text:p>
          </table:table-cell>
          <table:table-cell table:style-name="Table1.A1" office:value-type="string">
            <text:p text:style-name="Standard_20__28_user_29_"><text:span text:style-name="T5">Niveau :</text:span></text:p>
          </table:table-cell>
          <table:table-cell table:style-name="Table1.B1" office:value-type="string">
            <text:p text:style-name="Standard_20__28_user_29_"><text:span text:style-name="T7">3AC</text:span></text:p>
          </table:table-cell>
        </table:table-row>
        <table:table-row table:style-name="Table1.2">
          <table:table-cell table:style-name="Table1.A1" office:value-type="string">
            <text:p text:style-name="Standard_20__28_user_29_"><text:span text:style-name="T5">Unité : </text:span></text:p>
          </table:table-cell>
          <table:table-cell table:style-name="Table1.B1" office:value-type="string">
            <text:p text:style-name="Standard">U3- Algorithmique</text:p>
          </table:table-cell>
          <table:table-cell table:style-name="Table1.A1" office:value-type="string">
            <text:p text:style-name="Standard_20__28_user_29_"><text:span text:style-name="T5">Année :</text:span></text:p>
          </table:table-cell>
          <table:table-cell table:style-name="Table1.B1" office:value-type="string">
            <text:p text:style-name="Standard_20__28_user_29_"><text:span text:style-name="T7">2025/2026</text:span></text:p>
          </table:table-cell>
        </table:table-row>
        <table:table-row table:style-name="Table1.3">
          <table:table-cell table:style-name="Table1.A1" office:value-type="string">
            <text:p text:style-name="Standard_20__28_user_29_"><text:span text:style-name="T5">Séquence :</text:span></text:p>
          </table:table-cell>
          <table:table-cell table:style-name="Table1.B1" office:value-type="string">
            <text:p text:style-name="Standard">Structure de contrôle</text:p>
          </table:table-cell>
          <table:table-cell table:style-name="Table1.A1" office:value-type="string">
            <text:p text:style-name="Standard_20__28_user_29_"><text:span text:style-name="T5">Séance :</text:span></text:p>
          </table:table-cell>
          <table:table-cell table:style-name="Table1.B1" office:value-type="string">
            <text:p text:style-name="Standard_20__28_user_29_"><text:span text:style-name="T7">N° 5</text:span></text:p>
          </table:table-cell>
        </table:table-row>
        <table:table-row table:style-name="Table1.4">
          <table:table-cell table:style-name="Table1.A1" office:value-type="string">
            <text:p text:style-name="Standard_20__28_user_29_"><text:span text:style-name="T5">Leçon :</text:span></text:p>
          </table:table-cell>
          <table:table-cell table:style-name="Table1.B1" office:value-type="string">
            <text:p text:style-name="Standard_20__28_user_29_">La boucle tant que</text:p>
          </table:table-cell>
          <table:table-cell table:style-name="Table1.A1" office:value-type="string">
            <text:p text:style-name="Standard_20__28_user_29_"><text:span text:style-name="T5">Durée :</text:span></text:p>
          </table:table-cell>
          <table:table-cell table:style-name="Table1.B1" office:value-type="string">
            <text:p text:style-name="Standard_20__28_user_29_">1 h </text:p>
          </table:table-cell>
        </table:table-row>
      </table:table>
      <text:p text:style-name="P43"/>
      <text:p text:style-name="P45"><text:span text:style-name="T2"><text:s text:c="2"/>Compétence visée</text:span></text:p>
      <text:list xml:id="list3330775215" text:style-name="WWNum1">
        <text:list-item>
          <text:p text:style-name="P14">Maîtriser les notions de base de l’algorithmique afin de résoudre des problèmes simples.</text:p>
        </text:list-item>
      </text:list>
      <text:p text:style-name="P45"><text:span text:style-name="T2"><text:s text:c="2"/>Objectifs spécifiques</text:span></text:p>
      <text:list xml:id="list190551747890869" text:continue-numbering="true" text:style-name="WWNum1">
        <text:list-item>
          <text:p text:style-name="P12"><text:span text:style-name="T8">Comprendre le fonctionnement de la boucle Tant que.</text:span></text:p>
        </text:list-item>
      </text:list>
      <text:p text:style-name="P45"><text:span text:style-name="T2"><text:s text:c="2"/>Prérequis</text:span></text:p>
      <text:list xml:id="list190552194693175" text:continue-numbering="true" text:style-name="WWNum1">
        <text:list-item>
          <text:p text:style-name="P14"><text:span text:style-name="T13">La notion de la boucle.</text:span></text:p>
        </text:list-item>
        <text:list-item>
          <text:p text:style-name="P14"><text:span text:style-name="T13">La boucle Pour.</text:span></text:p>
        </text:list-item>
      </text:list>
      <text:p text:style-name="P45"><text:span text:style-name="T2"><text:s text:c="2"/>Savoir-faire</text:span></text:p>
      <text:list xml:id="list190553255684378" text:continue-numbering="true" text:style-name="WWNum1">
        <text:list-item>
          <text:p text:style-name="P4">Simuler la situation-problème.</text:p>
        </text:list-item>
        <text:list-item>
          <text:p text:style-name="P4">Identifier les actions répétées.</text:p>
        </text:list-item>
        <text:list-item>
          <text:p text:style-name="P4">Déterminer la condition de répétition.</text:p>
        </text:list-item>
        <text:list-item>
          <text:p text:style-name="P4">Utiliser la boucle « Tant Que » pour résoudre le problème.</text:p>
        </text:list-item>
      </text:list>
      <text:p text:style-name="P45"><text:span text:style-name="T2"><text:s text:c="2"/>Savoir-être</text:span></text:p>
      <text:list xml:id="list190552779009025" text:continue-numbering="true" text:style-name="WWNum1">
        <text:list-item>
          <text:p text:style-name="P14">Développer la curiosité et l’esprit d’observation.</text:p>
        </text:list-item>
        <text:list-item>
          <text:p text:style-name="P14">Travailler en groupe et collaborer.</text:p>
        </text:list-item>
        <text:list-item>
          <text:p text:style-name="P14">Participer activement aux activités.</text:p>
        </text:list-item>
        <text:list-item>
          <text:p text:style-name="P14">Accepter l’erreur comme source d’apprentissage.</text:p>
        </text:list-item>
      </text:list>
      <text:p text:style-name="P45"><text:span text:style-name="T2"><text:s text:c="2"/>Obstacles didactiques</text:span></text:p>
      <text:list xml:id="list3241977890" text:style-name="WWNum4">
        <text:list-item>
          <text:p text:style-name="P49">Difficulté à comprendre le principe de répétition</text:p>
        </text:list-item>
        <text:list-item>
          <text:p text:style-name="P49">Confusion entre condition vrai et condition faux</text:p>
        </text:list-item>
        <text:list-item>
          <text:p text:style-name="P49">Difficulté à prévoir l’arrêt de la boucle</text:p>
        </text:list-item>
        <text:list-item>
          <text:p text:style-name="P49">Difficulté de passage de langage naturelle au langage algorithmique</text:p>
        </text:list-item>
        <text:list-item>
          <text:p text:style-name="P49">Confusion entre la boucle Pour et la boucles Tant que</text:p>
        </text:list-item>
      </text:list>
      <text:p text:style-name="P45"><text:span text:style-name="T2"><text:s text:c="2"/>Ressources débranchées</text:span></text:p>
      <text:list xml:id="list190553278424014" text:continue-list="list190552779009025" text:style-name="WWNum1">
        <text:list-item>
          <text:p text:style-name="P50">Deux récipients (bol 1 et bol 2) pour le transfert des balles</text:p>
        </text:list-item>
        <text:list-item>
          <text:p text:style-name="P50">Des balles représentant les éléments à déplacer</text:p>
        </text:list-item>
        <text:list-item>
          <text:p text:style-name="P50">Un ruban adhésif pour tracer le parcours au sol</text:p>
        </text:list-item>
        <text:list-item>
          <text:p text:style-name="P50"><text:soft-page-break/>Un bandeau pour masquer les yeux de l’élève</text:p>
        </text:list-item>
        <text:list-item>
          <text:p text:style-name="P50">Un espace de classe aménagé pour le déplacement</text:p>
        </text:list-item>
      </text:list>
      <text:p text:style-name="P45"><text:span text:style-name="T2"><text:s text:c="2"/>Ressources technologiques</text:span></text:p>
      <text:list xml:id="list190551407000698" text:continue-numbering="true" text:style-name="WWNum1">
        <text:list-item>
          <text:p text:style-name="P50">Une vidéo pédagogique illustrant une situation de répétition et introduisant la notion de boucle infinie.</text:p>
        </text:list-item>
        <text:list-item>
          <text:p text:style-name="P50">Un quiz interactif sur Kahoot pour évaluer et renforcer la compréhension de la boucle « Tant Que ».</text:p>
        </text:list-item>
        <text:list-item>
          <text:p text:style-name="P50">Un support visuel (diaporama) pour la formalisation de la notion.</text:p>
        </text:list-item>
      </text:list>
      <text:p text:style-name="P45"><text:span text:style-name="T2"><text:s text:c="2"/></text:span><text:bookmark-start text:name="SITUATION"/><text:span text:style-name="T2">Situation problème :</text:span><text:bookmark-end text:name="SITUATION"/></text:p>
      <text:p text:style-name="P48">Nous avons deux récipients :</text:p>
      <text:list xml:id="list2274037199" text:style-name="WWNum14">
        <text:list-item>
          <text:p text:style-name="P51">Un bol contenant plusieurs balles ;</text:p>
        </text:list-item>
        <text:list-item>
          <text:p text:style-name="P51">Un autre bol vide placé au point d’arrivée.</text:p>
        </text:list-item>
      </text:list>
      <text:p text:style-name="P48">Ahmed se place au point de départ avec les yeux bandés, tandis que son camarade le guide à travers un parcours tracé au sol jusqu’au récipient vide afin d’y déposer une balle, puis il revient au point de départ.</text:p>
      <text:p text:style-name="P48"/>
      <text:p text:style-name="P48"><text:s text:c="29"/><draw:frame draw:style-name="fr1" draw:name="Image 1" text:anchor-type="as-char" svg:width="10.515cm" svg:height="5.906cm" draw:z-index="1"><draw:image xlink:href="Pictures/100000000000039A000002062F2D47ACA81394B8.jpg" xlink:type="simple" xlink:show="embed" xlink:actuate="onLoad" loext:mime-type="image/jpeg"/></draw:frame></text:p>
      <text:p text:style-name="P52"/>
      <text:p text:style-name="P48">Créer un algorithme qui aide Ahmed à déplacer les balles du bol 1 vers le bol 2 sachant qu'il doit prendre une balle à la fois et doit respecter le chemin dessiner.</text:p>
      <text:p text:style-name="P48"><text:span text:style-name="T14">Consignes :</text:span></text:p>
      <text:list xml:id="list2395444809" text:style-name="WWNum13">
        <text:list-item>
          <text:p text:style-name="P53">Quelle boucle peut-on utiliser pour aider Ahmed ?</text:p>
        </text:list-item>
        <text:list-item>
          <text:p text:style-name="P53">Dans quel cas peut-on utiliser la boucle Pour ?</text:p>
        </text:list-item>
        <text:list-item>
          <text:p text:style-name="P53">Est-ce que le nombre de répétitions dans ce cas est connu à l’avance ?</text:p>
        </text:list-item>
        <text:list-item>
          <text:p text:style-name="P53">Quelles sont les actions répétées par l’élève à chaque fois ?</text:p>
        </text:list-item>
        <text:list-item>
          <text:p text:style-name="P53">Que doit vérifier l’élève avant de recommencer ?</text:p>
        </text:list-item>
        <text:list-item>
          <text:p text:style-name="P53"><text:soft-page-break/>Quand l’action s’arrête-t-elle ?</text:p>
        </text:list-item>
        <text:list-item>
          <text:p text:style-name="P53">Quelle structure répétitive peut-on utiliser lorsque le nombre de répétitions n’est pas connu à l’avance ?</text:p>
        </text:list-item>
      </text:list>
      <text:p text:style-name="P48"/>
      <text:p text:style-name="P45"><text:span text:style-name="T2"><text:s text:c="2"/></text:span><text:span text:style-name="T3">Déroulement de la séance</text:span></text:p>
      <text:p text:style-name="P6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39"><text:span text:style-name="T6">Phase</text:span></text:p>
            </table:table-cell>
            <table:table-cell table:style-name="Table2.A1" office:value-type="string">
              <text:p text:style-name="P39"><text:span text:style-name="T6">Activités de l'Enseignant</text:span></text:p>
            </table:table-cell>
            <table:table-cell table:style-name="Table2.A1" office:value-type="string">
              <text:p text:style-name="P39"><text:span text:style-name="T6">Activités de l'Apprenant</text:span></text:p>
            </table:table-cell>
            <table:table-cell table:style-name="Table2.A1" office:value-type="string">
              <text:p text:style-name="Standard_20__28_user_29_"><text:span text:style-name="T6">Outils didactiques </text:span></text:p>
            </table:table-cell>
            <table:table-cell table:style-name="Table2.A1" office:value-type="string">
              <text:p text:style-name="P39"><text:span text:style-name="T6">Savoir apportées</text:span>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39"><text:span text:style-name="T6">Mise en situation</text:span></text:p>
            <text:p text:style-name="P39"><text:span text:style-name="T6">5 min</text:span></text:p>
          </table:table-cell>
          <table:table-cell table:style-name="Table2.B2" office:value-type="string">
            <text:p text:style-name="Standard_20__28_user_29_"><text:span text:style-name="T15">Rappel :</text:span></text:p>
            <text:list xml:id="list3139147795" text:style-name="WWNum5">
              <text:list-item>
                <text:p text:style-name="P15"><text:span text:style-name="T8">Qu’est-ce qu’un algorithme ?</text:span></text:p>
              </text:list-item>
            </text:list>
            <text:p text:style-name="P18"/>
            <text:p text:style-name="P18"/>
            <text:p text:style-name="P18"/>
            <text:p text:style-name="P18"/>
            <text:p text:style-name="P18"/>
            <text:list xml:id="list190552635767121" text:continue-numbering="true" text:style-name="WWNum5">
              <text:list-item>
                <text:p text:style-name="P15"><text:span text:style-name="T8">Qu’est-ce qu’une structure de contrôle ?</text:span></text:p>
              </text:list-item>
            </text:list>
            <text:p text:style-name="P13"/>
            <text:p text:style-name="P5"/>
            <text:p text:style-name="P5"/>
            <text:list xml:id="list190551683174250" text:continue-numbering="true" text:style-name="WWNum5">
              <text:list-item>
                <text:p text:style-name="P15"><text:span text:style-name="T8">Quelles sont les structures de contrôle déjà étudiées ?</text:span></text:p>
              </text:list-item>
            </text:list>
            <text:p text:style-name="P18"/>
            <text:p text:style-name="P18"/>
            <text:p text:style-name="P18"/>
            <text:list xml:id="list190551383498676" text:continue-numbering="true" text:style-name="WWNum5">
              <text:list-item>
                <text:p text:style-name="P15"><text:span text:style-name="T8">Qu'est-ce qu’une boucle ?</text:span></text:p>
              </text:list-item>
            </text:list>
            <text:p text:style-name="P19"/>
            <text:p text:style-name="P19"/>
            <text:p text:style-name="P19"/>
            <text:p text:style-name="P19"/>
            <text:list xml:id="list190551162546888" text:continue-numbering="true" text:style-name="WWNum5">
              <text:list-item>
                <text:p text:style-name="P15"><text:span text:style-name="T8">C’est quoi la boucle pour ?</text:span></text:p>
              </text:list-item>
            </text:list>
            <text:p text:style-name="P13"/>
            <text:p text:style-name="P13"><text:soft-page-break/></text:p>
            <text:p text:style-name="P13"/>
            <text:p text:style-name="P13"/>
            <text:p text:style-name="P13"/>
            <text:p text:style-name="P13"/>
            <text:list xml:id="list190553193651806" text:continue-numbering="true" text:style-name="WWNum5">
              <text:list-item>
                <text:p text:style-name="P15"><text:span text:style-name="T8">C’est quoi la syntaxe de la boucle Pour ?</text:span></text:p>
              </text:list-item>
            </text:list>
            <text:p text:style-name="P61"/>
            <text:p text:style-name="P61"/>
            <text:p text:style-name="P61"><text:span text:style-name="T15">Situation de départ : </text:span></text:p>
            <text:p text:style-name="P62"><text:a xlink:type="simple" xlink:href="#SITUATION" text:style-name="ListLabel_20_67" text:visited-style-name="ListLabel_20_67"><text:span text:style-name="Internet_20_link">Voir la situation problème ;</text:span></text:a></text:p>
            <text:p text:style-name="P48">Créer un algorithme qui aide Ahmed à déplacer les balles du bol 1 vers le bol 2 sachant qu'il doit prendre une balle à la fois et doit respecter le chemin dessiner.</text:p>
          </table:table-cell>
          <table:table-cell table:style-name="Table2.C2" office:value-type="string">
            <text:p text:style-name="P21"/>
            <text:list xml:id="list258316077" text:style-name="WWNum6">
              <text:list-item>
                <text:p text:style-name="P22"><text:span text:style-name="T14">Un algorithme</text:span> est une suite d’instructions ordonnées permettant de résoudre un problème.</text:p>
              </text:list-item>
              <text:list-item>
                <text:p text:style-name="P22"><text:span text:style-name="T14">Une structure de contrôle</text:span> permet d’organiser l’exécution des instructions dans un algorithme.</text:p>
              </text:list-item>
              <text:list-item>
                <text:p text:style-name="P22">La structure séquentielle, la structure conditionnelle et la structure répétitive.</text:p>
              </text:list-item>
              <text:list-item>
                <text:p text:style-name="P22"><text:span text:style-name="T9">Une boucle</text:span><text:span text:style-name="T8"> est une structure permettant la répétitions plusieurs fois d’un ensemble d’instructions sans les réécrire.</text:span></text:p>
              </text:list-item>
              <text:list-item>
                <text:p text:style-name="P22"><text:span text:style-name="T9">La boucle Pour</text:span><text:span text:style-name="T8"> est une boucle qui répète un bloc d’instructions un nombre déterminé de </text:span><text:soft-page-break/><text:span text:style-name="T8">fois.</text:span></text:p>
              </text:list-item>
              <text:list-item>
                <text:p text:style-name="P22"><text:span text:style-name="T9">Syntaxe :</text:span></text:p>
              </text:list-item>
            </text:list>
            <text:p text:style-name="P7"><text:span text:style-name="T8">Pour i de 1 à n Faire </text:span></text:p>
            <text:p text:style-name="P7"><text:span text:style-name="T8"><text:s text:c="4"/>Instructions </text:span></text:p>
            <text:p text:style-name="P7"><text:span text:style-name="T8">Fin Pour</text:span></text:p>
            <text:p text:style-name="P61"/>
            <text:p text:style-name="P61"/>
            <text:p text:style-name="P61"/>
            <text:p text:style-name="P61"/>
            <text:list xml:id="list555361002" text:style-name="WWNum16">
              <text:list-item>
                <text:p text:style-name="P24"><text:span text:style-name="T17">Suivre attentivement.</text:span></text:p>
              </text:list-item>
              <text:list-item>
                <text:p text:style-name="P23">Analyse de la situation.</text:p>
              </text:list-item>
            </text:list>
          </table:table-cell>
          <table:table-cell table:style-name="Table2.D2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8"/>
            <text:p text:style-name="P9">Vidéo Projecteur</text:p>
            <text:p text:style-name="P9">+</text:p>
            <text:p text:style-name="P39">Tableau</text:p>
          </table:table-cell>
          <table:table-cell table:style-name="Table2.E2" office:value-type="string">
            <text:p text:style-name="P61"/>
          </table:table-cell>
        </table:table-row>
        <table:table-row table:style-name="Table2.1">
          <table:table-cell table:style-name="Table2.A2" office:value-type="string">
            <text:p text:style-name="P39"><text:span text:style-name="T5">Analyse</text:span></text:p>
            <text:p text:style-name="P39"><text:span text:style-name="T5">40 min</text:span></text:p>
          </table:table-cell>
          <table:table-cell table:style-name="Table2.B3" office:value-type="string">
            <text:p text:style-name="P26"/>
            <text:list xml:id="list2614288973" text:style-name="WWNum7">
              <text:list-item>
                <text:p text:style-name="P27"><text:span text:style-name="T8">Discuter et valider la compréhension de la situation.</text:span></text:p>
              </text:list-item>
            </text:list>
            <text:p text:style-name="P6"><text:span text:style-name="T16">Questionnement :</text:span></text:p>
            <text:list xml:id="list3366051034" text:style-name="WWNum8">
              <text:list-item>
                <text:p text:style-name="P28"><text:span text:style-name="T8">Noter les hypothèses sur le tableau.</text:span></text:p>
              </text:list-item>
            </text:list>
            <text:p text:style-name="P48"><text:span text:style-name="T11">👉</text:span><text:span text:style-name="T8"> </text:span>Quelle boucle peut-on utiliser pour aider Ahmed ?</text:p>
            <text:p text:style-name="P48"><text:span text:style-name="T11">👉</text:span> Dans quel cas peut-on utiliser la boucle Pour ?</text:p>
            <text:p text:style-name="P48"/>
            <text:p text:style-name="P48"><text:span text:style-name="T11">👉</text:span> Est-ce que le nombre de répétitions dans ce cas est connu à l’avance ?</text:p>
            <text:p text:style-name="P48"><text:soft-page-break/></text:p>
            <text:p text:style-name="P48"><text:span text:style-name="T11">👉</text:span> Quelles sont les actions répétées par l’élève à chaque fois ?</text:p>
            <text:p text:style-name="P48"/>
            <text:p text:style-name="P48"/>
            <text:p text:style-name="P48"/>
            <text:p text:style-name="P48"/>
            <text:p text:style-name="P48"/>
            <text:p text:style-name="P48"><text:span text:style-name="T11">👉</text:span> Que doit vérifier l’élève avant de recommencer ?</text:p>
            <text:p text:style-name="P48"/>
            <text:p text:style-name="P48"><text:span text:style-name="T11">👉</text:span> Quand l’action s’arrête-t-elle ?</text:p>
            <text:p text:style-name="P48"/>
            <text:p text:style-name="P48"/>
            <text:p text:style-name="P48"/>
            <text:p text:style-name="P48"><text:span text:style-name="T11">👉</text:span> Quelle structure répétitive peut-on utiliser lorsque le nombre de répétitions n’est pas connu à l’avance ?</text:p>
            <text:p text:style-name="P48"/>
            <text:p text:style-name="Standard"><text:span text:style-name="T16">Mise en commun :</text:span></text:p>
            <text:p text:style-name="P2"/>
            <text:list xml:id="list2483751322" text:style-name="WWNum9">
              <text:list-item>
                <text:p text:style-name="P29">Filtrer les hypothèses correctes :</text:p>
              </text:list-item>
            </text:list>
            <text:p text:style-name="P61"><text:span text:style-name="T18">✔️ </text:span>On peut utiliser la boucle Pour.</text:p>
            <text:p text:style-name="P61"><text:span text:style-name="T18">✔️</text:span>Non, on utilise la boucle Pour lorsque le nombre de répétitions est connu à l’avance.</text:p>
            <text:p text:style-name="P61"><text:soft-page-break/><text:span text:style-name="T18">✔️</text:span>Non, Le nombre de répétitions n’est pas connu à l’avance.</text:p>
            <text:p text:style-name="P61"><text:span text:style-name="T18">✔️</text:span>À chaque répétition, Ahmed :</text:p>
            <text:list xml:id="list398425043" text:style-name="WWNum21">
              <text:list-item>
                <text:p text:style-name="P64">Prend une balle ;</text:p>
              </text:list-item>
              <text:list-item>
                <text:p text:style-name="P64">Suit le chemin tracé ;</text:p>
              </text:list-item>
              <text:list-item>
                <text:p text:style-name="P64">Dépose la balle dans le bol 2 ;</text:p>
              </text:list-item>
              <text:list-item>
                <text:p text:style-name="P64">Revenir.</text:p>
              </text:list-item>
            </text:list>
            <text:p text:style-name="P61"><text:span text:style-name="T18">✔️</text:span>S’il reste des balles dans le récipient.</text:p>
            <text:p text:style-name="P61"><text:span text:style-name="T18">✔️</text:span>Lorsqu’il ne reste plus de balles.</text:p>
            <text:p text:style-name="P61"><text:span text:style-name="T18">✔️ </text:span>La boucle « Tant Que »</text:p>
            <text:p text:style-name="P61"/>
            <text:p text:style-name="P61"/>
            <text:p text:style-name="Standard"><text:span text:style-name="T16">Institutionnalisation :</text:span></text:p>
            <text:p text:style-name="P2"/>
            <text:list xml:id="list1542774797" text:style-name="WWNum10">
              <text:list-item>
                <text:p text:style-name="P16"><text:span text:style-name="T8">Déduire et construire :</text:span></text:p>
              </text:list-item>
              <text:list-item>
                <text:p text:style-name="P16"><text:span text:style-name="T8"><text:s/>La définition de la boucle Tant que.</text:span></text:p>
              </text:list-item>
            </text:list>
            <text:p text:style-name="P30"/>
            <text:p text:style-name="P30"/>
            <text:p text:style-name="P30"/>
            <text:list xml:id="list190551504712493" text:continue-numbering="true" text:style-name="WWNum10">
              <text:list-item>
                <text:p text:style-name="P16"><text:span text:style-name="T8">La syntaxe de la boucle Tant que.</text:span></text:p>
              </text:list-item>
            </text:list>
            <text:p text:style-name="P13"/>
            <text:p text:style-name="P13"/>
            <text:p text:style-name="P13"/>
            <text:p text:style-name="P13"/>
            <text:list xml:id="list190551714418206" text:continue-numbering="true" text:style-name="WWNum10">
              <text:list-item>
                <text:p text:style-name="P16"><text:span text:style-name="T8">Montrer une</text:span></text:p>
              </text:list-item>
            </text:list>
            <text:p text:style-name="P31"><text:a xlink:type="simple" xlink:href="https://drive.google.com/drive/folders/1q_H3SH979IXXy_JxbmDMqk9v3eVRw3yR" text:style-name="ListLabel_20_68" text:visited-style-name="ListLabel_20_68"><text:span text:style-name="Internet_20_link"><text:span text:style-name="T14"><text:s/>Vidéo</text:span></text:span></text:a><text:span text:style-name="T8"> expliquant le cas de la boucle infinie.</text:span></text:p>
            <text:p text:style-name="P5"/>
            <text:p text:style-name="P5"><text:soft-page-break/></text:p>
            <text:p text:style-name="Standard"><text:span text:style-name="T16">Réinvestissement :</text:span></text:p>
            <text:p text:style-name="P2"/>
            <text:list xml:id="list190552093109438" text:continue-list="list3366051034" text:style-name="WWNum8">
              <text:list-item>
                <text:p text:style-name="P17"><text:span text:style-name="T8">Demander aux apprenants de faire exercice d’application.</text:span></text:p>
              </text:list-item>
            </text:list>
            <text:p text:style-name="P10"><text:a xlink:type="simple" xlink:href="#Annexe" text:style-name="ListLabel_20_68" text:visited-style-name="ListLabel_20_68"><text:span text:style-name="Internet_20_link"><text:span text:style-name="T14">Voir l’annexe</text:span></text:span></text:a></text:p>
            <text:list xml:id="list190553128181775" text:continue-numbering="true" text:style-name="WWNum8">
              <text:list-item>
                <text:p text:style-name="P17"><text:span text:style-name="T8">Demander aux apprenants de noter la correction.</text:span></text:p>
              </text:list-item>
              <text:list-item>
                <text:p text:style-name="P17"><text:span text:style-name="T8">Noter le cours.</text:span></text:p>
              </text:list-item>
            </text:list>
          </table:table-cell>
          <table:table-cell table:style-name="Table2.C3" office:value-type="string">
            <text:p text:style-name="P6"/>
            <text:list xml:id="list190553206171914" text:continue-list="list190551714418206" text:style-name="WWNum10">
              <text:list-item>
                <text:p text:style-name="P25">Comprendre la situation</text:p>
              </text:list-item>
            </text:list>
            <text:p text:style-name="P20"/>
            <text:p text:style-name="P20"/>
            <text:list xml:id="list104819234" text:style-name="WWNum11">
              <text:list-item>
                <text:p text:style-name="P32"><text:span text:style-name="T14">Proposer les hypothèses :</text:span></text:p>
              </text:list-item>
            </text:list>
            <text:list xml:id="list1018143165" text:style-name="WWNum15">
              <text:list-item>
                <text:p text:style-name="P65">On peut utiliser la boucle Pour.</text:p>
              </text:list-item>
            </text:list>
            <text:p text:style-name="P66"/>
            <text:list xml:id="list190553274630458" text:continue-numbering="true" text:style-name="WWNum15">
              <text:list-item>
                <text:p text:style-name="P65">Non, on utilise la boucle Pour lorsque le nombre de répétitions est connu à l’avance.</text:p>
              </text:list-item>
            </text:list>
            <text:p text:style-name="List_20_Paragraph"/>
            <text:list xml:id="list190551552827357" text:continue-numbering="true" text:style-name="WWNum15">
              <text:list-item>
                <text:p text:style-name="P65">Non, Le nombre de répétitions n’est pas connu à <text:soft-page-break/>l’avance.</text:p>
              </text:list-item>
            </text:list>
            <text:p text:style-name="List_20_Paragraph"/>
            <text:p text:style-name="List_20_Paragraph"/>
            <text:list xml:id="list190552138502500" text:continue-numbering="true" text:style-name="WWNum15">
              <text:list-item>
                <text:p text:style-name="P65">À chaque répétition, Ahmed :</text:p>
              </text:list-item>
            </text:list>
            <text:p text:style-name="List_20_Paragraph"/>
            <text:list xml:id="list190552895942981" text:continue-list="list398425043" text:style-name="WWNum21">
              <text:list-item>
                <text:p text:style-name="P64">Prend une balle ;</text:p>
              </text:list-item>
              <text:list-item>
                <text:p text:style-name="P64">Suit le chemin tracé ;</text:p>
              </text:list-item>
              <text:list-item>
                <text:p text:style-name="P64">Dépose la balle dans le bol 2 ;</text:p>
              </text:list-item>
              <text:list-item>
                <text:p text:style-name="P64">Revenir.</text:p>
              </text:list-item>
            </text:list>
            <text:p text:style-name="P66"/>
            <text:list xml:id="list190552390734183" text:continue-list="list190552138502500" text:style-name="WWNum15">
              <text:list-item>
                <text:p text:style-name="P65">S’il reste des balles dans le récipient.</text:p>
              </text:list-item>
            </text:list>
            <text:p text:style-name="P61"/>
            <text:p text:style-name="P61"/>
            <text:list xml:id="list190552848449993" text:continue-numbering="true" text:style-name="WWNum15">
              <text:list-item>
                <text:p text:style-name="P65">Lorsqu’il ne reste plus de balles.</text:p>
              </text:list-item>
              <text:list-item>
                <text:p text:style-name="P65">Quand l’élève décide de s’arrêter après quelques répétitions.</text:p>
              </text:list-item>
            </text:list>
            <text:p text:style-name="P61"/>
            <text:list xml:id="list190551980221478" text:continue-numbering="true" text:style-name="WWNum15">
              <text:list-item>
                <text:p text:style-name="P65">La boucle « Tant Que ».</text:p>
              </text:list-item>
              <text:list-item>
                <text:p text:style-name="P65">La boucle « Pour » avec un nombre choisi au hasard </text:p>
              </text:list-item>
            </text:list>
            <text:p text:style-name="P61"/>
            <text:p text:style-name="P61"/>
            <text:p text:style-name="P61"/>
            <text:p text:style-name="P61"/>
            <text:list xml:id="list728986390" text:style-name="WWNum17">
              <text:list-item>
                <text:p text:style-name="P33">Discuter les hypothèses.</text:p>
              </text:list-item>
            </text:list>
            <text:p text:style-name="P61"/>
            <text:p text:style-name="P61"/>
            <text:p text:style-name="P61"/>
            <text:p text:style-name="P61"><text:soft-page-break/></text:p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list xml:id="list190552628011998" text:continue-numbering="true" text:style-name="WWNum17">
              <text:list-item>
                <text:p text:style-name="P34">Suivre et participer.</text:p>
              </text:list-item>
            </text:list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<text:soft-page-break/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list xml:id="list190551342323514" text:continue-numbering="true" text:style-name="WWNum17">
              <text:list-item>
                <text:p text:style-name="P34">Réaliser l’exercice.</text:p>
              </text:list-item>
            </text:list>
            <text:p text:style-name="P6"/>
            <text:list xml:id="list190552968042840" text:continue-numbering="true" text:style-name="WWNum17">
              <text:list-item>
                <text:p text:style-name="P35">Noter la correction.</text:p>
              </text:list-item>
            </text:list>
            <text:p text:style-name="P36"/>
            <text:list xml:id="list190552426252393" text:continue-numbering="true" text:style-name="WWNum17">
              <text:list-item>
                <text:p text:style-name="P34">Noter le cours.</text:p>
              </text:list-item>
            </text:list>
          </table:table-cell>
          <table:table-cell table:style-name="Table2.D3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oft-page-break/></text:p>
            <text:p text:style-name="P9">Vidéo Projecteur</text:p>
            <text:p text:style-name="P9">+</text:p>
            <text:p text:style-name="P9">Tableau</text:p>
            <text:p text:style-name="P9">+</text:p>
            <text:p text:style-name="P9">Ordinateur</text:p>
            <text:p text:style-name="P39"/>
          </table:table-cell>
          <table:table-cell table:style-name="Table2.E3" office:value-type="string"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><text:soft-page-break/></text:p>
            <text:p text:style-name="P37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list xml:id="list1372078962" text:style-name="WWNum12">
              <text:list-item>
                <text:p text:style-name="P38"><text:span text:style-name="T19">Définition de la boucle Tant que :</text:span></text:p>
              </text:list-item>
            </text:list>
            <text:p text:style-name="P1"/>
            <text:p text:style-name="Standard"><text:span text:style-name="T9">La boucle Tant que :</text:span><text:span text:style-name="T8"> </text:span>est une structure de contrôle qui permet de répéter un bloc d’instructions tant qu’une condition est vraie, sans connaître à l’avance le nombre de répétitions.</text:p>
            <text:p text:style-name="Standard"/>
            <text:list xml:id="list190551845615751" text:continue-numbering="true" text:style-name="WWNum12">
              <text:list-item>
                <text:p text:style-name="P38"><text:span text:style-name="T19">Syntaxe de la boucle Tant que :</text:span></text:p>
              </text:list-item>
            </text:list>
            <text:p text:style-name="Standard">Tant que (condition) Faire</text:p>
            <text:p text:style-name="Standard"><text:s text:c="4"/>Instructions</text:p>
            <text:p text:style-name="P61">Fin Tant que</text:p>
            <text:list xml:id="list13250394" text:style-name="WWNum20">
              <text:list-item>
                <text:p text:style-name="P67"><text:span text:style-name="T19">La boucle infinie :</text:span></text:p>
              </text:list-item>
            </text:list>
            <text:p text:style-name="P61">Une boucle infinie se produit lorsque la condition reste toujours vraie.</text:p>
            <text:p text:style-name="P61">Dans ce cas, les instructions se répètent <text:soft-page-break/>sans arrêt.</text:p>
          </table:table-cell>
        </table:table-row>
        <table:table-row table:style-name="Table2.1">
          <table:table-cell table:style-name="Table2.A2" office:value-type="string">
            <text:p text:style-name="P39"><text:span text:style-name="T6">Synthèse</text:span></text:p>
            <text:p text:style-name="P39"><text:span text:style-name="T6">10 min </text:span></text:p>
          </table:table-cell>
          <table:table-cell table:style-name="Table2.B4" office:value-type="string">
            <text:list xml:id="list190552748812914" text:continue-list="list190551407000698" text:style-name="WWNum1">
              <text:list-item>
                <text:p text:style-name="P63">Organiser <text:a xlink:type="simple" xlink:href="https://play.kahoot.it/v2/?quizId=141795ab-5e01-4cec-b754-165a253f7fb5" text:style-name="ListLabel_20_68" text:visited-style-name="ListLabel_20_68"><text:span text:style-name="Internet_20_link"><text:span text:style-name="T14">le quiz Kahoot</text:span></text:span></text:a> en groupes pour évaluer la compréhension des élèves.</text:p>
              </text:list-item>
            </text:list>
          </table:table-cell>
          <table:table-cell table:style-name="Table2.C4" office:value-type="string">
            <text:list xml:id="list190551720371216" text:continue-numbering="true" text:style-name="WWNum1">
              <text:list-item>
                <text:p text:style-name="P63">Répondre aux questions du quiz en groupe.</text:p>
              </text:list-item>
              <text:list-item>
                <text:p text:style-name="P63">Participer activement</text:p>
              </text:list-item>
            </text:list>
          </table:table-cell>
          <table:table-cell table:style-name="Table2.D4" office:value-type="string">
            <text:p text:style-name="P39"/>
          </table:table-cell>
          <table:table-cell table:style-name="Table2.E4" office:value-type="string">
            <text:p text:style-name="P61"/>
          </table:table-cell>
        </table:table-row>
      </table:table>
      <text:p text:style-name="P55"/>
      <text:p text:style-name="P45"><text:span text:style-name="T2"><text:s text:c="2"/></text:span><text:span text:style-name="T3">Annexe 1 :</text:span><text:bookmark text:name="Annexe"/></text:p>
      <text:p text:style-name="P55"><text:span text:style-name="T20">Exercice : Boucle « Tant Que »</text:span></text:p>
      <text:p text:style-name="P55"><text:span text:style-name="T14">Consigne :</text:span></text:p>
      <text:p text:style-name="P55">Remets les instructions dans le bon ordre pour écrire un algorithme qui affiche les nombres pairs de 2 à 12.</text:p>
      <text:p text:style-name="P55"><text:span text:style-name="T18">⚠️</text:span> <text:span text:style-name="T14">Attention :</text:span></text:p>
      <text:p text:style-name="P55">Certaines cartes sont des intrus.</text:p>
      <text:p text:style-name="P55">Le groupe qui trouve la solution correcte en premier gagne.</text:p>
      <text:p text:style-name="P55">Instructions à trier : </text:p>
      <text:p text:style-name="P68">A. Début</text:p>
      <text:p text:style-name="P68"><text:soft-page-break/>B. nombre ← 2</text:p>
      <text:p text:style-name="P68">C. Tant que nombre ≤ 12 faire</text:p>
      <text:p text:style-name="P68">D. nombre ← nombre + 1 </text:p>
      <text:p text:style-name="P68">E. Afficher "pair" </text:p>
      <text:p text:style-name="P68">F. Afficher nombre</text:p>
      <text:p text:style-name="P68">G. Tant que nombre &gt; 12 Faire</text:p>
      <text:p text:style-name="P68">H. Fin</text:p>
      <text:p text:style-name="P68">I. nombre ← 0 </text:p>
      <text:p text:style-name="P68">J. nombre ← nombre + 2</text:p>
      <text:p text:style-name="P68">K. Fin Tant Que</text:p>
      <text:p text:style-name="P68"><draw:frame text:anchor-type="paragraph" draw:z-index="0" draw:name="Picture 2" draw:style-name="gr1" draw:text-style-name="P71" svg:width="13.96cm" svg:height="12.032cm" svg:x="1.951cm" svg:y="1.434cm"><draw:image xlink:href="Pictures/100000000000055C00000640F064E3815018028B.jpg" xlink:type="simple" xlink:show="embed" xlink:actuate="onLoad" loext:mime-type="image/jpeg"><text:p/></draw:image></draw:frame>L. nombre ← nombre + 0<text:span text:style-name="T18"> </text:span></text:p>
      <text:p text:style-name="P69"/>
      <text:p text:style-name="P46"/>
      <text:p text:style-name="P46"/>
      <text:p text:style-name="P44"><text:soft-page-break/></text:p>
      <text:p text:style-name="P44"/>
      <text:p text:style-name="P47"><text:span text:style-name="T4"><text:s text:c="2"/>Différenciation pédagogique :</text:span></text:p>
      <text:p text:style-name="P54"><text:span text:style-name="T21">Dans cette séance, plusieurs activités variées seront utilisées afin de faciliter la compréhension de la notion de la boucle « Tant Que » chez tous les apprenants, quelles que soient leurs différences ou leurs manières d’apprendre.</text:span></text:p>
      <text:list xml:id="list2986766430" text:style-name="WWNum22">
        <text:list-item>
          <text:p text:style-name="P57"><text:span text:style-name="T21">L’activité débranchée permettra aux élèves de vivre concrètement la répétition des actions à travers le déplacement des balles entre les deux récipients. Grâce à cette manipulation, les apprenants pourront observer les actions répétées, identifier la condition de répétition et comprendre le rôle de la condition d’arrêt avant la formalisation algorithmique.</text:span></text:p>
        </text:list-item>
        <text:list-item>
          <text:p text:style-name="P57"><text:span text:style-name="T21">La vidéo pédagogique aidera les élèves à visualiser une autre situation de répétition ainsi que le cas de la boucle infinie, ce qui renforcera leur compréhension de la notion.</text:span></text:p>
        </text:list-item>
        <text:list-item>
          <text:p text:style-name="P57"><text:span text:style-name="T21">Le support visuel facilitera la présentation de la définition, de la syntaxe et des différentes étapes de la boucle « Tant Que », afin d’aider les apprenants à structurer leurs connaissances.</text:span></text:p>
        </text:list-item>
        <text:list-item>
          <text:p text:style-name="P57"><text:span text:style-name="T21">Le travail en groupe favorisera les échanges, la participation active, la coopération et l’entraide entre les élèves.</text:span></text:p>
        </text:list-item>
        <text:list-item>
          <text:p text:style-name="P57"><text:span text:style-name="T21">Le quiz interactif permettra de motiver les apprenants, de vérifier leur compréhension et de renforcer les acquis de manière dynamique et interactive.</text:span></text:p>
        </text:list-item>
      </text:list>
      <text:p text:style-name="P54"><text:span text:style-name="T21">Ainsi, la diversité des activités proposées permettra de prendre en compte les différents styles d’apprentissage des apprenants, qu’ils soient </text:span><text:span text:style-name="T22">visuels, auditifs </text:span><text:span text:style-name="T21">ou</text:span><text:span text:style-name="T22"> kinesthésiques</text:span><text:span text:style-name="T21">.</text:span></text:p>
      <text:p text:style-name="P54"><text:span text:style-name="T21">Afin de prendre en compte les différences de niveau entre les apprenants :</text:span></text:p>
      <text:list xml:id="list2792046553" text:style-name="WWNum23">
        <text:list-item>
          <text:p text:style-name="P58"><text:span text:style-name="T21">Les élèves en difficulté bénéficieront d’explications supplémentaires, d’exemples simplifiés et d’un accompagnement progressif.</text:span></text:p>
        </text:list-item>
        <text:list-item>
          <text:p text:style-name="P58"><text:span text:style-name="T21">Les consignes pourront être reformulées si nécessaire.</text:span></text:p>
        </text:list-item>
        <text:list-item>
          <text:p text:style-name="P58"><text:span text:style-name="T21">Des activités ou défis supplémentaires seront proposés aux élèves avancés.</text:span></text:p>
        </text:list-item>
      </text:list>
      <text:p text:style-name="P59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5"><text:span text:style-name="T2"><text:s text:c="2"/></text:span><text:span text:style-name="T3">Justification didactique :</text:span></text:p>
      <text:p text:style-name="P48"><text:span text:style-name="T20">1. Pourquoi cette ressource ?</text:span></text:p>
      <text:p text:style-name="P55">Nous avons choisi <text:span text:style-name="T14">une activité débranchée</text:span> structurée et expérimentale basée sur le transport de balles entre deux récipients afin de placer les élèves dans une situation concrète proche d’un problème réel.</text:p>
      <text:p text:style-name="P55">Cette ressource constitue le point de départ de la construction du savoir, car elle permet aux apprenants de :</text:p>
      <text:list xml:id="list190553018328839" text:continue-list="list190551720371216" text:style-name="WWNum1">
        <text:list-item>
          <text:p text:style-name="P56">Vivre la situation et agir directement ;</text:p>
        </text:list-item>
        <text:list-item>
          <text:p text:style-name="P56">Observer la répétition des actions dans un contexte réel ;</text:p>
        </text:list-item>
        <text:list-item>
          <text:p text:style-name="P56">Identifier progressivement la notion de condition sans la formaliser immédiatement ;</text:p>
        </text:list-item>
        <text:list-item>
          <text:p text:style-name="P56">Construire eux-mêmes le sens de la boucle « Tant Que » à partir de l’expérience.</text:p>
        </text:list-item>
      </text:list>
      <text:p text:style-name="P55">L’activité débranchée joue ici un rôle central : elle n’est pas une simple illustration, mais un dispositif de découverte et de construction du concept.</text:p>
      <text:p text:style-name="P55"><text:span text:style-name="T14">L’intégration des TICE</text:span> (vidéo + Kahoot) intervient ensuite pour :</text:p>
      <text:list xml:id="list190552426339042" text:continue-numbering="true" text:style-name="WWNum1">
        <text:list-item>
          <text:p text:style-name="P56">Confronter les élèves à une autre situation ;</text:p>
        </text:list-item>
        <text:list-item>
          <text:p text:style-name="P56">Renforcer la compréhension par observation ;</text:p>
        </text:list-item>
        <text:list-item>
          <text:p text:style-name="P56">Dynamiser l’apprentissage et l’évaluation.</text:p>
        </text:list-item>
      </text:list>
      <text:p text:style-name="P55"><text:span text:style-name="T20">2. Quel problème d’apprentissage cette ressource résout-elle ?</text:span></text:p>
      <text:p text:style-name="P55">Les élèves rencontrent souvent des difficultés liées à :</text:p>
      <text:list xml:id="list190551488647882" text:continue-numbering="true" text:style-name="WWNum1">
        <text:list-item>
          <text:p text:style-name="P56">La compréhension de la répétition conditionnelle ;</text:p>
        </text:list-item>
        <text:list-item>
          <text:p text:style-name="P56">La distinction entre boucle POUR et boucle TANT QUE ;</text:p>
        </text:list-item>
        <text:list-item>
          <text:p text:style-name="P56">L’identification du rôle de la condition d’arrêt ;</text:p>
        </text:list-item>
        <text:list-item>
          <text:p text:style-name="P56">Le passage du concret vers l’abstrait.</text:p>
        </text:list-item>
      </text:list>
      <text:p text:style-name="P55"><text:span text:style-name="T14">L’activité débranchée</text:span> permet de résoudre ces difficultés en donnant aux élèves une expérience réelle et corporelle de la répétition, ce qui facilite la compréhension avant toute formalisation algorithmique.</text:p>
      <text:p text:style-name="P55"><text:span text:style-name="T14">La vidéo et le Kahoot</text:span> viennent ensuite pour :</text:p>
      <text:list xml:id="list190552339522911" text:continue-numbering="true" text:style-name="WWNum1">
        <text:list-item>
          <text:p text:style-name="P56">Consolider la compréhension ;</text:p>
        </text:list-item>
        <text:list-item>
          <text:p text:style-name="P56"><text:soft-page-break/>Corriger les erreurs ;</text:p>
        </text:list-item>
        <text:list-item>
          <text:p text:style-name="P56">Renforcer la mémorisation.</text:p>
        </text:list-item>
      </text:list>
      <text:p text:style-name="P70"/>
      <text:p text:style-name="P55"><text:span text:style-name="T20">3. Quelle théorie est mobilisée ?</text:span></text:p>
      <text:p text:style-name="P55">Cette séquence s’appuie principalement sur <text:span text:style-name="T14">le constructivisme.</text:span></text:p>
      <text:p text:style-name="P55">Selon cette approche, l’élève construit ses connaissances à partir de ses propres actions et expériences.</text:p>
      <text:p text:style-name="P55">Dans cette démarche :</text:p>
      <text:list xml:id="list190551356421106" text:continue-numbering="true" text:style-name="WWNum1">
        <text:list-item>
          <text:p text:style-name="P56">L’activité débranchée permet une expérimentation concrète ;</text:p>
        </text:list-item>
        <text:list-item>
          <text:p text:style-name="P56">Les élèves découvrent progressivement la notion de boucle ;</text:p>
        </text:list-item>
        <text:list-item>
          <text:p text:style-name="P56">La formalisation vient après l’action.</text:p>
        </text:list-item>
      </text:list>
      <text:p text:style-name="P55">On mobilise également :</text:p>
      <text:list xml:id="list190553135520841" text:continue-numbering="true" text:style-name="WWNum1">
        <text:list-item>
          <text:p text:style-name="P56">Le socio-constructivisme, car les élèves interagissent, discutent et se corrigent entre eux ;</text:p>
        </text:list-item>
        <text:list-item>
          <text:p text:style-name="P56">L’apprentissage actif, car l’élève est acteur de son apprentissage ;</text:p>
        </text:list-item>
        <text:list-item>
          <text:p text:style-name="P56">L’approche inductive, où la règle (boucle Tant Que) est découverte à partir d’un cas concret.</text:p>
        </text:list-item>
      </text:list>
      <text:p text:style-name="P55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OpenSymbol" svg:font-family="OpenSymbol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  <style:font-face style:name="Segoe UI Emoji1" svg:font-family="'Segoe UI Emoj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List_20_Paragraph" style:display-name="List Paragraph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En-tête_20_Car" style:display-name="En-tête C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Pied_20_de_20_page_20_Car" style:display-name="Pied de page C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use-window-font-color="tru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fo:color="#c00000" fo:font-weight="bold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asian="NSimSun" style:font-family-asian="NSimSun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/>
    <style:style style:name="ListLabel_20_68" style:display-name="ListLabel 68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7502582511" style:display-name="175025825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0354680611" style:display-name="303546806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style:font-name="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44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image text:level="1" xlink:href="Pictures/100002000000000F0000000FA0762865A4F89A9D.gif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2.54cm"/>
        </style:list-level-properties>
      </text:list-level-style-image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image text:level="1" xlink:href="Pictures/100002000000000F0000000FA0762865A4F89A9D.gif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27cm"/>
        </style:list-level-properties>
      </text:list-level-style-image>
      <text:list-level-style-bullet text:level="2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image text:level="1" xlink:href="Pictures/100002000000000F0000000FA0762865A4F89A9D.gif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27cm"/>
        </style:list-level-properties>
      </text:list-level-style-image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MOHAMED AMINE ALLAOUI</dc:creator>
    <meta:editing-cycles>17</meta:editing-cycles>
    <meta:print-date>2026-05-20T04:26:00</meta:print-date>
    <meta:creation-date>2026-05-15T05:15:00</meta:creation-date>
    <dc:date>2026-05-20T04:43:00</dc:date>
    <meta:editing-duration>PT21H23M</meta:editing-duration>
    <meta:generator>Trio_Office/6.2.8.2$Windows_x86 LibreOffice_project/</meta:generator>
    <meta:document-statistic meta:table-count="2" meta:image-count="1" meta:object-count="0" meta:page-count="11" meta:paragraph-count="240" meta:word-count="1873" meta:character-count="10961" meta:non-whitespace-character-count="93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